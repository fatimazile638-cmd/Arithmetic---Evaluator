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20000039E13DA75CC.png" manifest:media-type="image/png"/>
  <manifest:file-entry manifest:full-path="Pictures/10000001000000B50000021E68504D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1.0835in" fo:margin-top="0in" fo:margin-bottom="0.1063in" style:contextual-spacing="false" fo:line-height="108%" fo:text-align="center" style:justify-single-word="false" fo:text-indent="0in" style:auto-text-indent="false"/>
    </style:style>
    <style:style style:name="P2" style:family="paragraph" style:parent-style-name="Standard">
      <style:paragraph-properties fo:margin-left="0in" fo:margin-right="1.0835in" fo:margin-top="0in" fo:margin-bottom="0.1063in" style:contextual-spacing="false" fo:line-height="108%" fo:text-align="center" style:justify-single-word="false" fo:text-indent="0in" style:auto-text-indent="false"/>
      <style:text-properties style:font-name="Times New Roman" fo:font-size="26pt" style:text-underline-style="solid" style:text-underline-width="auto" style:text-underline-color="font-color" fo:font-weight="bold" style:font-size-asian="26pt" style:font-weight-asian="bold" style:font-name-complex="Times New Roman1" style:font-size-complex="26pt"/>
    </style:style>
    <style:style style:name="P3" style:family="paragraph" style:parent-style-name="Standard">
      <style:paragraph-properties fo:margin-left="0in" fo:margin-right="1.0835in" fo:margin-top="0in" fo:margin-bottom="0.1063in" style:contextual-spacing="false" fo:line-height="108%" fo:text-indent="0in" style:auto-text-indent="false"/>
      <style:text-properties style:font-name="Times New Roman" fo:font-size="26pt" style:text-underline-style="solid" style:text-underline-width="auto" style:text-underline-color="font-color" fo:font-weight="bold" style:font-size-asian="26pt" style:font-weight-asian="bold" style:font-name-complex="Times New Roman1" style:font-size-complex="26pt"/>
    </style:style>
    <style:style style:name="P4" style:family="paragraph" style:parent-style-name="Standard">
      <style:paragraph-properties fo:margin-left="0in" fo:margin-right="1.0835in" fo:margin-top="0in" fo:margin-bottom="0.1063in" style:contextual-spacing="false" fo:line-height="108%" fo:text-align="center" style:justify-single-word="false" fo:text-indent="0in" style:auto-text-indent="false"/>
      <style:text-properties style:font-name="Times New Roman" style:text-underline-style="solid" style:text-underline-width="auto" style:text-underline-color="font-color" style:font-name-complex="Times New Roman1"/>
    </style:style>
    <style:style style:name="P5" style:family="paragraph" style:parent-style-name="Standard">
      <style:paragraph-properties fo:margin-left="0in" fo:margin-right="0in" fo:margin-top="0in" fo:margin-bottom="0.4252in" style:contextual-spacing="false" fo:line-height="108%" fo:text-indent="0in" style:auto-text-indent="false"/>
    </style:style>
    <style:style style:name="P6" style:family="paragraph" style:parent-style-name="Heading_20_1">
      <style:paragraph-properties fo:margin-left="-0.0035in" fo:margin-right="0in" fo:text-indent="-0.0071in" style:auto-text-indent="false"/>
    </style:style>
    <style:style style:name="P7" style:family="paragraph" style:parent-style-name="Standard">
      <style:text-properties style:font-name="Times New Roman" style:font-name-complex="Times New Roman1"/>
    </style:style>
    <style:style style:name="P8" style:family="paragraph" style:parent-style-name="Standard">
      <style:paragraph-properties fo:margin-left="-0.0035in" fo:margin-right="1.0634in" fo:margin-top="0in" fo:margin-bottom="0.2472in" style:contextual-spacing="false" fo:text-indent="-0.0071in" style:auto-text-indent="false"/>
    </style:style>
    <style:style style:name="P9" style:family="paragraph" style:parent-style-name="Standard">
      <style:paragraph-properties fo:margin-left="0in" fo:margin-right="0.9709in" fo:text-indent="0in" style:auto-text-indent="false"/>
    </style:style>
    <style:style style:name="P10" style:family="paragraph" style:parent-style-name="Standard">
      <style:text-properties style:font-name="Times New Roman" fo:font-size="16pt" officeooo:paragraph-rsid="00007d35" style:font-size-asian="16pt" style:font-name-complex="Times New Roman1" style:font-size-complex="14pt"/>
    </style:style>
    <style:style style:name="P11" style:family="paragraph" style:parent-style-name="Standard">
      <style:text-properties style:font-name="Times New Roman" fo:font-size="20pt" fo:font-weight="bold" officeooo:rsid="00007d35" officeooo:paragraph-rsid="00007d35" style:font-size-asian="20pt" style:font-weight-asian="bold" style:font-name-complex="Times New Roman1" style:font-size-complex="20pt" style:font-weight-complex="bold"/>
    </style:style>
    <style:style style:name="P12" style:family="paragraph" style:parent-style-name="Standard">
      <style:text-properties style:font-name="Times New Roman" fo:font-size="14pt" officeooo:paragraph-rsid="00007d35" style:font-size-asian="14pt" style:font-name-complex="Times New Roman1" style:font-size-complex="14pt"/>
    </style:style>
    <style:style style:name="P13" style:family="paragraph" style:parent-style-name="Heading_20_1">
      <style:text-properties style:font-name="Times New Roman" fo:font-size="14pt" style:font-size-asian="14pt" style:font-name-complex="Times New Roman1" style:font-size-complex="14pt"/>
    </style:style>
    <style:style style:name="P14" style:family="paragraph" style:parent-style-name="Standard">
      <style:paragraph-properties fo:margin-left="0in" fo:margin-right="0.9709in" fo:text-indent="0in" style:auto-text-indent="false"/>
      <style:text-properties style:font-name="Times New Roman" fo:font-size="14pt" style:font-size-asian="14pt" style:font-name-complex="Times New Roman1" style:font-size-complex="14pt"/>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officeooo:paragraph-rsid="00007d35" style:font-size-asian="14pt" style:font-size-complex="14pt"/>
    </style:style>
    <style:style style:name="P17" style:family="paragraph" style:parent-style-name="Standard">
      <style:paragraph-properties fo:margin-left="0in" fo:margin-right="0.9709in" fo:text-indent="0in" style:auto-text-indent="false"/>
      <style:text-properties style:font-name="Times New Roman" fo:font-size="20pt" fo:font-weight="bold" style:font-size-asian="20pt" style:font-weight-asian="bold" style:font-name-complex="Times New Roman1" style:font-size-complex="16pt"/>
    </style:style>
    <style:style style:name="P18" style:family="paragraph" style:parent-style-name="Standard">
      <style:text-properties style:font-name="Times New Roman" fo:font-size="14pt" style:font-size-asian="14pt" style:font-name-complex="Times New Roman1" style:font-size-complex="14pt"/>
    </style:style>
    <style:style style:name="P19" style:family="paragraph" style:parent-style-name="Standard">
      <style:text-properties style:font-name="Times New Roman" fo:font-size="11pt" style:font-size-asian="11pt" style:font-name-complex="Times New Roman1" style:font-size-complex="14pt"/>
    </style:style>
    <style:style style:name="P20" style:family="paragraph" style:parent-style-name="Normal_20__28_Web_29_">
      <style:paragraph-properties fo:margin-top="0.1945in" fo:margin-bottom="0.1945in" style:contextual-spacing="false"/>
    </style:style>
    <style:style style:name="P21" style:family="paragraph" style:parent-style-name="Normal_20__28_Web_29_">
      <style:paragraph-properties fo:margin-top="0.1945in" fo:margin-bottom="0.1945in" style:contextual-spacing="false"/>
      <style:text-properties fo:font-size="11pt" officeooo:paragraph-rsid="00005ad0" style:font-size-asian="11pt" style:font-size-complex="14pt"/>
    </style:style>
    <style:style style:name="P22" style:family="paragraph" style:parent-style-name="Normal_20__28_Web_29_">
      <style:paragraph-properties fo:margin-top="0.1945in" fo:margin-bottom="0.1945in" style:contextual-spacing="false"/>
      <style:text-properties fo:font-size="16pt" officeooo:paragraph-rsid="00005ad0" style:font-size-asian="16pt" style:font-size-complex="16pt"/>
    </style:style>
    <style:style style:name="P23" style:family="paragraph" style:parent-style-name="Normal_20__28_Web_29_">
      <style:paragraph-properties fo:margin-top="0.1945in" fo:margin-bottom="0.1945in" style:contextual-spacing="false"/>
      <style:text-properties fo:font-size="16pt" style:font-size-asian="16pt" style:font-size-complex="16pt"/>
    </style:style>
    <style:style style:name="P24" style:family="paragraph" style:parent-style-name="Standard">
      <style:text-properties style:font-name="Times New Roman" fo:font-size="16pt" style:font-size-asian="16pt" style:font-name-complex="Times New Roman1" style:font-size-complex="16pt"/>
    </style:style>
    <style:style style:name="P25" style:family="paragraph" style:parent-style-name="Standard">
      <style:paragraph-properties>
        <style:tab-stops>
          <style:tab-stop style:position="1.7291in"/>
        </style:tab-stops>
      </style:paragraph-properties>
      <style:text-properties style:font-name="Times New Roman" fo:font-size="14pt" style:font-size-asian="14pt" style:font-name-complex="Times New Roman1" style:font-size-complex="14pt"/>
    </style:style>
    <style:style style:name="P26" style:family="paragraph" style:parent-style-name="Standard">
      <style:paragraph-properties fo:margin-left="0in" fo:text-indent="0in" style:auto-text-indent="false">
        <style:tab-stops>
          <style:tab-stop style:position="1.7291in"/>
        </style:tab-stops>
      </style:paragraph-properties>
      <style:text-properties style:font-name="Times New Roman" fo:font-size="24pt" fo:font-weight="bold" style:font-size-asian="24pt" style:font-weight-asian="bold" style:font-name-complex="Times New Roman1" style:font-size-complex="14pt"/>
    </style:style>
    <style:style style:name="P27" style:family="paragraph">
      <loext:graphic-properties draw:fill="solid" draw:fill-color="#e7e6e6"/>
      <style:paragraph-properties fo:text-align="left"/>
      <style:text-properties fo:font-size="10pt"/>
    </style:style>
    <style:style style:name="P28" style:family="paragraph" style:parent-style-name="Standard">
      <style:paragraph-properties fo:margin-left="0in" fo:margin-right="0in" fo:margin-top="0in" fo:margin-bottom="0.111in" style:contextual-spacing="false" fo:line-height="108%" fo:text-indent="0in" style:auto-text-indent="false"/>
    </style:style>
    <style:style style:name="P29" style:family="paragraph">
      <loext:graphic-properties draw:fill="none"/>
      <style:paragraph-properties fo:text-align="left"/>
    </style:style>
    <style:style style:name="P30" style:family="paragraph">
      <loext:graphic-properties draw:fill="solid" draw:fill-color="#f5f5f5"/>
      <style:paragraph-properties fo:text-align="left"/>
      <style:text-properties fo:font-size="10pt"/>
    </style:style>
    <style:style style:name="P31" style:family="paragraph" style:parent-style-name="Standard">
      <style:paragraph-properties fo:margin-left="0in" fo:margin-right="0in" fo:margin-top="0in" fo:margin-bottom="0.111in" style:contextual-spacing="false" fo:line-height="108%" fo:text-indent="0in" style:auto-text-indent="false"/>
      <style:text-properties style:font-name="Times New Roman" officeooo:paragraph-rsid="00005ad0" style:font-name-asian="Times New Roman1" style:font-name-complex="Times New Roman1"/>
    </style:style>
    <style:style style:name="P32" style:family="paragraph">
      <loext:graphic-properties draw:fill="none"/>
      <style:paragraph-properties fo:text-align="left"/>
      <style:text-properties fo:font-size="10pt"/>
    </style:style>
    <style:style style:name="P33" style:family="paragraph" style:parent-style-name="Standard">
      <style:paragraph-properties fo:margin-left="0in" fo:margin-right="0.9709in" fo:text-indent="0in" style:auto-text-indent="false">
        <style:tab-stops>
          <style:tab-stop style:position="1.7291in"/>
        </style:tab-stops>
      </style:paragraph-properties>
      <style:text-properties style:font-name="Times New Roman" fo:font-size="14pt" style:font-size-asian="14pt" style:font-name-complex="Times New Roman1" style:font-size-complex="14pt"/>
    </style:style>
    <style:style style:name="P34" style:family="paragraph" style:parent-style-name="Standard">
      <style:paragraph-properties fo:margin-left="0in" fo:text-indent="0in" style:auto-text-indent="false">
        <style:tab-stops>
          <style:tab-stop style:position="1.7291in"/>
        </style:tab-stops>
      </style:paragraph-properties>
      <style:text-properties style:font-name="Times New Roman" fo:font-size="14pt" style:font-size-asian="14pt" style:font-name-complex="Times New Roman1" style:font-size-complex="14pt"/>
    </style:style>
    <style:style style:name="P35" style:family="paragraph" style:parent-style-name="Standard">
      <style:paragraph-properties fo:margin-left="-0.0035in" fo:margin-right="0in" fo:margin-top="0in" fo:margin-bottom="0in" style:contextual-spacing="false" fo:line-height="108%" fo:text-indent="-0.0071in" style:auto-text-indent="false"/>
    </style:style>
    <style:style style:name="P36" style:family="paragraph" style:parent-style-name="Standard">
      <style:paragraph-properties fo:margin-left="-0.0035in" fo:margin-right="1.0634in" fo:margin-top="0in" fo:margin-bottom="0.1634in" style:contextual-spacing="false" fo:text-indent="-0.0071in" style:auto-text-indent="false"/>
    </style:style>
    <style:style style:name="P37" style:family="paragraph" style:parent-style-name="Standard">
      <style:paragraph-properties fo:margin-left="-0.0035in" fo:margin-right="1.0634in" fo:margin-top="0in" fo:margin-bottom="0.2465in" style:contextual-spacing="false" fo:text-indent="-0.0071in" style:auto-text-indent="false"/>
    </style:style>
    <style:style style:name="P38" style:family="paragraph" style:parent-style-name="Standard">
      <style:paragraph-properties fo:margin-left="-0.0035in" fo:margin-right="1.0634in" fo:text-indent="-0.0071in" style:auto-text-indent="false"/>
    </style:style>
    <style:style style:name="P39" style:family="paragraph" style:parent-style-name="Standard">
      <style:paragraph-properties fo:margin-left="-0.0035in" fo:margin-right="5.7791in" fo:margin-top="0in" fo:margin-bottom="0.2472in" style:contextual-spacing="false" fo:text-indent="-0.0071in" style:auto-text-indent="false"/>
    </style:style>
    <style:style style:name="T1" style:family="text">
      <style:text-properties style:font-name="Times New Roman" fo:font-size="26pt" style:text-underline-style="solid" style:text-underline-width="auto" style:text-underline-color="font-color" fo:font-weight="bold" style:font-size-asian="26pt" style:font-weight-asian="bold" style:font-name-complex="Times New Roman1" style:font-size-complex="26pt"/>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fo:font-size="18pt" style:font-size-asian="18pt" style:font-name-complex="Times New Roman1" style:font-size-complex="18pt"/>
    </style:style>
    <style:style style:name="T4" style:family="text">
      <style:text-properties style:font-name="Times New Roman" fo:font-size="18pt" fo:font-weight="bold" style:font-size-asian="18pt" style:font-weight-asian="bold" style:font-name-complex="Times New Roman1" style:font-size-complex="18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style:font-name-complex="Times New Roman1"/>
    </style:style>
    <style:style style:name="T7" style:family="text">
      <style:text-properties style:font-name="Times New Roman" fo:font-size="16pt" style:font-size-asian="16pt" style:font-name-complex="Times New Roman1" style:font-size-complex="14pt"/>
    </style:style>
    <style:style style:name="T8" style:family="text">
      <style:text-properties style:font-name="Times New Roman" fo:font-size="14pt" style:font-size-asian="14pt" style:font-name-complex="Times New Roman1" style:font-size-complex="14pt"/>
    </style:style>
    <style:style style:name="T9" style:family="text">
      <style:text-properties fo:font-size="14pt" style:font-size-asian="14pt" style:font-size-complex="14pt"/>
    </style:style>
    <style:style style:name="T10" style:family="text">
      <style:text-properties fo:font-size="14pt" officeooo:rsid="00005ad0"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font-name="Times New Roman" fo:font-size="18pt" style:font-size-asian="18pt" style:font-name-complex="Times New Roman1" style:font-size-complex="14pt"/>
    </style:style>
    <style:style style:name="T13" style:family="text">
      <style:text-properties style:font-name="Times New Roman" fo:font-size="11pt" style:font-size-asian="11pt" style:font-name-complex="Times New Roman1" style:font-size-complex="14pt"/>
    </style:style>
    <style:style style:name="T14" style:family="text">
      <style:text-properties fo:font-size="16pt" style:font-size-asian="16pt" style:font-size-complex="16pt"/>
    </style:style>
    <style:style style:name="T15" style:family="text">
      <style:text-properties fo:font-size="16pt" style:font-name-asian="F" style:font-size-asian="16pt" style:font-size-complex="16pt"/>
    </style:style>
    <style:style style:name="T16" style:family="text">
      <style:text-properties style:font-name="Times New Roman" fo:font-size="24pt" fo:font-weight="bold" style:font-size-asian="24pt" style:font-weight-asian="bold" style:font-name-complex="Times New Roman1" style:font-size-complex="14pt"/>
    </style:style>
    <style:style style:name="T17" style:family="text">
      <style:text-properties style:font-name="Times New Roman" style:font-name-asian="Times New Roman1" style:font-name-complex="Times New Roman1"/>
    </style:style>
    <style:style style:name="T18" style:family="text">
      <style:text-properties style:font-name="Times New Roman" fo:font-size="8pt" style:font-name-asian="Times New Roman1" style:font-size-asian="8pt" style:font-name-complex="Times New Roman1"/>
    </style:style>
    <style:style style:name="T19" style:family="text">
      <style:text-properties style:font-name="Times New Roman" fo:font-size="26pt" style:font-size-asian="26pt" style:font-name-complex="Times New Roman1"/>
    </style:style>
    <style:style style:name="T20" style:family="text">
      <style:text-properties style:font-name="Times New Roman" fo:font-size="16pt" style:font-size-asian="16pt" style:font-name-complex="Times New Roman1"/>
    </style:style>
    <style:style style:name="T21" style:family="text">
      <style:text-properties style:font-name="Times New Roman" fo:font-size="16pt" fo:font-weight="bold" style:font-size-asian="16pt" style:font-weight-asian="bold" style:font-name-complex="Times New Roman1"/>
    </style:style>
    <style:style style:name="T22" style:family="text">
      <style:text-properties style:font-name="Times New Roman" fo:font-size="22pt" style:font-size-asian="22pt" style:font-name-complex="Times New Roman1" style:font-size-complex="14pt"/>
    </style:style>
    <style:style style:name="fr1" style:family="graphic" style:parent-style-name="Graphics">
      <style:graphic-properties fo:margin-left="0in" fo:margin-right="0in" fo:margin-top="0in" fo:margin-bottom="0in" style:vertical-pos="from-top"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from-top"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1173in" fo:margin-right="0.1484in" fo:margin-top="0in" fo:margin-bottom="0.0118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38in" svg:stroke-color="#000000" draw:stroke-linejoin="miter" svg:stroke-linecap="butt" draw:fill="solid" draw:fill-color="#e7e6e6" draw:textarea-vertical-align="top" draw:auto-grow-height="false" fo:min-height="1.0335in" fo:min-width="2.8744in" fo:padding-top="0in" fo:padding-bottom="0in" fo:padding-left="0in" fo:padding-right="0in" fo:wrap-option="wrap" loext:decorative="false" style:run-through="foreground">
        <loext:fill-complex-color loext:theme-type="light2" loext:color-type="theme"/>
      </style:graphic-properties>
    </style:style>
    <style:style style:name="gr3" style:family="graphic" style:parent-style-name="Frame">
      <style:graphic-properties draw:stroke="none" svg:stroke-width="0in" draw:fill="none" loext:fill-use-slide-background="false" draw:textarea-vertical-align="top" draw:auto-grow-height="false" fo:min-height="0.1547in" fo:min-width="0.5047in" fo:padding-top="0in" fo:padding-bottom="0in" fo:padding-left="0in" fo:padding-right="0in" fo:wrap-option="wrap" loext:decorative="false" style:run-through="foreground"/>
    </style:style>
    <style:style style:name="gr4" style:family="graphic">
      <style:graphic-properties draw:stroke="solid" svg:stroke-width="0.0138in" svg:stroke-color="#000000" draw:stroke-linejoin="miter" svg:stroke-linecap="butt" draw:fill="solid" draw:fill-color="#f5f5f5" draw:textarea-vertical-align="top" draw:auto-grow-height="false" fo:min-height="0.5161in" fo:min-width="2.5146in" fo:padding-top="0in" fo:padding-bottom="0in" fo:padding-left="0in" fo:padding-right="0in" fo:wrap-option="wrap" loext:decorative="false" style:run-through="foreground"/>
    </style:style>
    <style:style style:name="gr5" style:family="graphic" style:parent-style-name="Frame">
      <style:graphic-properties draw:stroke="none" svg:stroke-width="0in" draw:fill="none" loext:fill-use-slide-background="false" draw:textarea-vertical-align="top" draw:auto-grow-height="false" fo:min-height="0.1547in" fo:min-width="1.0756in" fo:padding-top="0in" fo:padding-bottom="0in" fo:padding-left="0in" fo:padding-right="0in" fo:wrap-option="wrap" loext:decorative="false" style:run-through="foreground"/>
    </style:style>
    <style:style style:name="gr6" style:family="graphic">
      <style:graphic-properties draw:stroke="solid" svg:stroke-width="0.0138in" svg:stroke-color="#000000" draw:stroke-linejoin="miter" svg:stroke-linecap="butt" draw:fill="solid" draw:fill-color="#f5f5f5" draw:textarea-vertical-align="top" draw:auto-grow-height="false" fo:min-height="0.5807in" fo:min-width="1.6764in" fo:padding-top="0in" fo:padding-bottom="0in" fo:padding-left="0in" fo:padding-right="0in" fo:wrap-option="wrap" loext:decorative="false" style:run-through="foreground"/>
    </style:style>
    <style:style style:name="gr7" style:family="graphic" style:parent-style-name="Frame">
      <style:graphic-properties draw:stroke="none" svg:stroke-width="0in" draw:fill="none" loext:fill-use-slide-background="false" draw:textarea-vertical-align="top" draw:auto-grow-height="false" fo:min-height="0.1547in" fo:min-width="0.8409in" fo:padding-top="0in" fo:padding-bottom="0in" fo:padding-left="0in" fo:padding-right="0in" fo:wrap-option="wrap" loext:decorative="false" style:run-through="foreground"/>
    </style:style>
    <style:style style:name="gr8" style:family="graphic">
      <style:graphic-properties draw:stroke="solid" svg:stroke-width="0.0138in" svg:stroke-color="#000000" draw:stroke-linejoin="miter" svg:stroke-linecap="butt" draw:fill="solid" draw:fill-color="#f5f5f5" draw:textarea-vertical-align="top" draw:auto-grow-height="false" fo:min-height="0.7382in" fo:min-width="1.9161in" fo:padding-top="0in" fo:padding-bottom="0in" fo:padding-left="0in" fo:padding-right="0in" fo:wrap-option="wrap" loext:decorative="false" style:run-through="foreground"/>
    </style:style>
    <style:style style:name="gr9" style:family="graphic" style:parent-style-name="Frame">
      <style:graphic-properties draw:stroke="none" svg:stroke-width="0in" draw:fill="none" loext:fill-use-slide-background="false" draw:textarea-vertical-align="top" draw:auto-grow-height="false" fo:min-height="0.1547in" fo:min-width="0.7839in" fo:padding-top="0in" fo:padding-bottom="0in" fo:padding-left="0in" fo:padding-right="0in" fo:wrap-option="wrap" loext:decorative="false" style:run-through="foreground"/>
    </style:style>
    <style:style style:name="gr10" style:family="graphic">
      <style:graphic-properties draw:stroke="solid" svg:stroke-width="0.0138in" svg:stroke-color="#000000" draw:stroke-linejoin="miter" svg:stroke-linecap="butt" draw:fill="solid" draw:fill-color="#f5f5f5" draw:textarea-vertical-align="top" draw:auto-grow-height="false" fo:min-height="0.5161in" fo:min-width="1.4362in" fo:padding-top="0in" fo:padding-bottom="0in" fo:padding-left="0in" fo:padding-right="0in" fo:wrap-option="wrap" loext:decorative="false" style:run-through="foreground"/>
    </style:style>
    <style:style style:name="gr11" style:family="graphic" style:parent-style-name="Frame">
      <style:graphic-properties draw:stroke="none" svg:stroke-width="0in" draw:fill="none" loext:fill-use-slide-background="false" draw:textarea-vertical-align="top" draw:auto-grow-height="false" fo:min-height="0.1547in" fo:min-width="0.5575in" fo:padding-top="0in" fo:padding-bottom="0in" fo:padding-left="0in" fo:padding-right="0in" fo:wrap-option="wrap" loext:decorative="false" style:run-through="foreground"/>
    </style:style>
    <style:style style:name="gr12" style:family="graphic">
      <style:graphic-properties draw:stroke="solid" svg:stroke-width="0.0138in" svg:stroke-color="#000000" draw:stroke-linejoin="miter" svg:stroke-linecap="butt" draw:fill="solid" draw:fill-color="#e7e6e6" draw:textarea-vertical-align="top" draw:auto-grow-height="false" fo:min-height="1.0335in" fo:min-width="2.6339in" fo:padding-top="0in" fo:padding-bottom="0in" fo:padding-left="0in" fo:padding-right="0in" fo:wrap-option="wrap" loext:decorative="false" style:run-through="foreground">
        <loext:fill-complex-color loext:theme-type="light2" loext:color-type="theme"/>
      </style:graphic-properties>
    </style:style>
    <style:style style:name="gr13" style:family="graphic" style:parent-style-name="Frame">
      <style:graphic-properties draw:stroke="none" svg:stroke-width="0in" draw:fill="none" loext:fill-use-slide-background="false" draw:textarea-vertical-align="top" draw:auto-grow-height="false" fo:min-height="0.1547in" fo:min-width="0.3272in" fo:padding-top="0in" fo:padding-bottom="0in" fo:padding-left="0in" fo:padding-right="0in" fo:wrap-option="wrap" loext:decorative="false" style:run-through="foreground"/>
    </style:style>
    <style:style style:name="gr14" style:family="graphic" style:parent-style-name="Frame">
      <style:graphic-properties draw:stroke="none" svg:stroke-width="0in" draw:fill="none" loext:fill-use-slide-background="false" draw:textarea-vertical-align="top" draw:auto-grow-height="false" fo:min-height="0.1547in" fo:min-width="0.8717in" fo:padding-top="0in" fo:padding-bottom="0in" fo:padding-left="0in" fo:padding-right="0in" fo:wrap-option="wrap" loext:decorative="false" style:run-through="foreground"/>
    </style:style>
    <style:style style:name="gr15" style:family="graphic">
      <style:graphic-properties draw:stroke="solid" svg:stroke-width="0.0138in" svg:stroke-color="#000000" draw:stroke-linejoin="miter" svg:stroke-linecap="butt" draw:fill="solid" draw:fill-color="#e7e6e6" draw:textarea-vertical-align="top" draw:auto-grow-height="false" fo:min-height="1.0335in" fo:min-width="2.4902in" fo:padding-top="0in" fo:padding-bottom="0in" fo:padding-left="0in" fo:padding-right="0in" fo:wrap-option="wrap" loext:decorative="false" style:run-through="foreground">
        <loext:fill-complex-color loext:theme-type="light2" loext:color-type="theme"/>
      </style:graphic-properties>
    </style:style>
    <style:style style:name="gr16" style:family="graphic">
      <style:graphic-properties draw:stroke="solid" svg:stroke-width="0.0138in" svg:stroke-color="#000000" draw:stroke-linejoin="miter" svg:stroke-linecap="butt" draw:fill="none" loext:fill-use-slide-background="false" draw:textarea-vertical-align="top" draw:auto-grow-height="false" fo:min-height="0.2575in" fo:min-width="0.0008in" fo:padding-top="0in" fo:padding-bottom="0in" fo:padding-left="0in" fo:padding-right="0in" fo:wrap-option="wrap" loext:decorative="false" style:run-through="foreground"/>
    </style:style>
    <style:style style:name="gr17" style:family="graphic">
      <style:graphic-properties draw:stroke="solid" svg:stroke-width="0.0138in" svg:stroke-color="#000000" draw:stroke-linejoin="miter" svg:stroke-linecap="butt" draw:fill="none" loext:fill-use-slide-background="false" draw:textarea-vertical-align="top" draw:auto-grow-height="false" fo:min-height="0.322in" fo:min-width="0.0008in" fo:padding-top="0in" fo:padding-bottom="0in" fo:padding-left="0in" fo:padding-right="0in" fo:wrap-option="wrap" loext:decorative="false" style:run-through="foreground"/>
    </style:style>
    <style:style style:name="gr18" style:family="graphic">
      <style:graphic-properties draw:stroke="solid" svg:stroke-width="0.0138in" svg:stroke-color="#000000" draw:stroke-linejoin="miter" svg:stroke-linecap="butt" draw:fill="none" loext:fill-use-slide-background="false" draw:textarea-vertical-align="top" draw:auto-grow-height="false" fo:min-height="0.0008in" fo:min-width="0.3583in" fo:padding-top="0in" fo:padding-bottom="0in" fo:padding-left="0in" fo:padding-right="0in" fo:wrap-option="wrap" loext:decorative="false" style:run-through="foreground"/>
    </style:style>
    <style:style style:name="gr19" style:family="graphic" style:parent-style-name="Frame">
      <style:graphic-properties draw:stroke="none" svg:stroke-width="0in" draw:fill="none" loext:fill-use-slide-background="false" draw:textarea-vertical-align="top" draw:auto-grow-height="false" fo:min-height="0.1236in" fo:min-width="0.198in" fo:padding-top="0in" fo:padding-bottom="0in" fo:padding-left="0in" fo:padding-right="0in" fo:wrap-option="wrap" loext:decorative="false" style:run-through="foreground"/>
    </style:style>
    <style:style style:name="gr20" style:family="graphic">
      <style:graphic-properties draw:stroke="solid" svg:stroke-width="0.0138in" svg:stroke-color="#000000" draw:stroke-linejoin="miter" svg:stroke-linecap="butt" draw:fill="none" loext:fill-use-slide-background="false" draw:textarea-vertical-align="top" draw:auto-grow-height="false" fo:min-height="0.0008in" fo:min-width="0.239in" fo:padding-top="0in" fo:padding-bottom="0in" fo:padding-left="0in" fo:padding-right="0in" fo:wrap-option="wrap" loext:decorative="false" style:run-through="foreground"/>
    </style:style>
    <style:style style:name="gr21" style:family="graphic" style:parent-style-name="Frame">
      <style:graphic-properties draw:stroke="none" svg:stroke-width="0in" draw:fill="none" loext:fill-use-slide-background="false" draw:textarea-vertical-align="top" draw:auto-grow-height="false" fo:min-height="0.1236in" fo:min-width="0.1555in" fo:padding-top="0in" fo:padding-bottom="0in" fo:padding-left="0in" fo:padding-right="0in" fo:wrap-option="wrap" loext:decorative="false" style:run-through="foreground"/>
    </style:style>
    <style:style style:name="gr22" style:family="graphic">
      <style:graphic-properties draw:stroke="solid" svg:stroke-width="0.0138in" svg:stroke-color="#000000" draw:stroke-linejoin="miter" svg:stroke-linecap="butt" draw:fill="none" loext:fill-use-slide-background="false" draw:textarea-vertical-align="top" draw:auto-grow-height="false" fo:min-height="0.5465in" fo:min-width="0.1063in" fo:padding-top="0in" fo:padding-bottom="0in" fo:padding-left="0in" fo:padding-right="0in" fo:wrap-option="wrap" loext:decorative="false" style:run-through="foreground"/>
    </style:style>
    <style:style style:name="gr23" style:family="graphic">
      <style:graphic-properties draw:stroke="solid" svg:stroke-width="0.0138in" svg:stroke-color="#000000" draw:stroke-linejoin="miter" svg:stroke-linecap="butt" draw:fill="none" loext:fill-use-slide-background="false" draw:textarea-vertical-align="top" draw:auto-grow-height="false" fo:min-height="0.3925in" fo:min-width="0.0728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COURSE:</text:span><text:span text:style-name="T1"/></text:p>
      <text:p text:style-name="P1" loext:marker-style-name="T1"><text:span text:style-name="T1">COMPILER CONSTRUCTION</text:span><text:span text:style-name="T1"/></text:p>
      <text:p text:style-name="P1" loext:marker-style-name="T1"><text:span text:style-name="T1">SUBMITTED BY:</text:span><text:span text:style-name="T1"/></text:p>
      <text:p text:style-name="P1" loext:marker-style-name="T1"><text:span text:style-name="T1">NOOR FATIMA 096</text:span><text:span text:style-name="T1"/></text:p>
      <text:p text:style-name="P1" loext:marker-style-name="T1"><text:span text:style-name="T1">MARIAM SHOAIB 057</text:span><text:span text:style-name="T1"/></text:p>
      <text:p text:style-name="P1" loext:marker-style-name="T1"><text:span text:style-name="T1">NOOR FATIMA 158</text:span><text:span text:style-name="T1"/></text:p>
      <text:p text:style-name="P1" loext:marker-style-name="T1"><text:span text:style-name="T1">AYEIZA AROOB 134</text:span><text:span text:style-name="T1"/></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1"/>
      <text:p text:style-name="P2" loext:marker-style-name="T1"/>
      <text:p text:style-name="P1" loext:marker-style-name="T1"><text:soft-page-break/><text:span text:style-name="T1">ARITHMETIC EXPRESSION EVALUATOR</text:span><text:span text:style-name="T1"/></text:p>
      <text:p text:style-name="P4" loext:marker-style-name="T2"/>
      <text:p text:style-name="P5" loext:marker-style-name="T3"><text:span text:style-name="T4">Compiler Construction Project Documentation;</text:span><text:span text:style-name="T4"/></text:p>
      <text:h text:style-name="P6" text:outline-level="1" loext:marker-style-name="T5"><text:span text:style-name="T5">Introduction:</text:span><text:span text:style-name="T5"/></text:h>
      <text:p text:style-name="P7" loext:marker-style-name="T6"/>
      <text:p text:style-name="P8" loext:marker-style-name="T7"><text:span text:style-name="T7">An Arithmetic Expression Evaluator is a compiler component that reads mathematical expressions, checks their correctness, applies operator precedence rules, and computes the final result. The system simulates important compiler phases such as lexical analysis, syntax analysis, and evaluation.</text:span><text:span text:style-name="T7"/></text:p>
      <text:h text:style-name="P6" text:outline-level="1" loext:marker-style-name="T5"><text:span text:style-name="T5">Objectives:</text:span><text:span text:style-name="T5"/></text:h>
      <text:p text:style-name="P7" loext:marker-style-name="T6"/>
      <text:p text:style-name="Standard" loext:marker-style-name="T7"><text:span text:style-name="T7">• Evaluate arithmetic expressions entered by the user. </text:span><text:span text:style-name="T7"/></text:p>
      <text:p text:style-name="Standard" loext:marker-style-name="T7"><text:span text:style-name="T7">• Apply compiler construction concepts in a practical system</text:span><text:span text:style-name="T7"/></text:p>
      <text:p text:style-name="P9" loext:marker-style-name="T7"><text:span text:style-name="T7"><text:s/>• Perform tokenization and parsing of expressions.</text:span><text:span text:style-name="T7"/></text:p>
      <text:p text:style-name="P10" loext:marker-style-name="T7"><text:s/>• Generate accurate results according to precedence rules.</text:p>
      <text:p text:style-name="P11">WORK FLOW:</text:p>
      <text:p text:style-name="P12" loext:marker-style-name="T8"><text:soft-page-break/><text:span text:style-name="T8"><draw:frame draw:style-name="fr1" draw:name="Picture 1" text:anchor-type="as-char" svg:y="-5.8756in" svg:width="2.9528in" svg:height="5.7638in" draw:z-index="12"><draw:image xlink:href="Pictures/10000001000000B50000021E68504DE8.png" xlink:type="simple" xlink:show="embed" xlink:actuate="onLoad" draw:mime-type="image/png"/><svg:desc>C:\Users\hp\Downloads\Untitled Diagram.drawio (2).png</svg:desc></draw:frame></text:span></text:p>
      <text:h text:style-name="P13" text:outline-level="1" loext:marker-style-name="T9"/>
      <text:p text:style-name="P14" loext:marker-style-name="T8"/>
      <text:p text:style-name="P15"/>
      <text:p text:style-name="P15"/>
      <text:p text:style-name="P16"><text:span text:style-name="T9">This </text:span><text:span text:style-name="T10">workflow </text:span><text:span text:style-name="T9">shows the </text:span><text:span text:style-name="Strong_20_Emphasis"><text:span text:style-name="T11">flow of an expression evaluation system (like a simple </text:span></text:span><text:bookmark text:name="_GoBack"/><text:span text:style-name="Strong_20_Emphasis"><text:span text:style-name="T11">compiler/interpreter)</text:span></text:span><text:span text:style-name="T9">.</text:span></text:p>
      <text:p text:style-name="Standard"><text:span text:style-name="T9">First, the </text:span><text:span text:style-name="Strong_20_Emphasis"><text:span text:style-name="T11">user</text:span></text:span><text:span text:style-name="T9"> inputs an arithmetic expression. Then the </text:span><text:span text:style-name="Strong_20_Emphasis"><text:span text:style-name="T11">lexical analyzer</text:span></text:span><text:span text:style-name="T9"> converts the input into tokens (small meaningful parts like numbers and operators). After that, the </text:span><text:span text:style-name="Strong_20_Emphasis"><text:span text:style-name="T11">syntax analyzer</text:span></text:span><text:span text:style-name="T9"> checks if the expression follows correct grammar rules.</text:span></text:p>
      <text:p text:style-name="Standard"><text:span text:style-name="T9">Next, the </text:span><text:span text:style-name="Strong_20_Emphasis"><text:span text:style-name="T11">semantic analyzer</text:span></text:span><text:span text:style-name="T9"> checks the meaning and validity of the expression. Then the system </text:span><text:span text:style-name="Strong_20_Emphasis"><text:span text:style-name="T11">evaluates the expression and calculates the result</text:span></text:span><text:span text:style-name="T9">.</text:span></text:p>
      <text:p text:style-name="Standard"><text:soft-page-break/><text:span text:style-name="T9">Finally, the result is sent to the </text:span><text:span text:style-name="Strong_20_Emphasis"><text:span text:style-name="T11">output module</text:span></text:span><text:span text:style-name="T9">, which displays the final answer to the user</text:span></text:p>
      <text:p text:style-name="P17"/>
      <text:p text:style-name="P17" loext:marker-style-name="T12"/>
      <text:p text:style-name="P17" loext:marker-style-name="T12">Data Flow Diagram (DFD - Level 0)<text:span text:style-name="T12"/></text:p>
      <text:p text:style-name="P18" loext:marker-style-name="T8"/>
      <text:p text:style-name="P14" loext:marker-style-name="T8"/>
      <text:p text:style-name="P19" loext:marker-style-name="T13"/>
      <text:p text:style-name="Standard" loext:marker-style-name="T13"><text:span text:style-name="T13"><text:s text:c="27"/></text:span></text:p>
      <text:p text:style-name="P20"><draw:frame draw:style-name="fr2" draw:name="Picture 6" text:anchor-type="as-char" svg:y="-6.1598in" svg:width="3.3252in" svg:height="5.639in" draw:z-index="11"><draw:image xlink:href="Pictures/10000001000002220000039E13DA75CC.png" xlink:type="simple" xlink:show="embed" xlink:actuate="onLoad" draw:mime-type="image/png"/><svg:desc>C:\Users\hp\Downloads\Untitled Diagram.drawio (1) (2).png</svg:desc></draw:frame></text:p>
      <text:p text:style-name="P21"><text:soft-page-break/><text:s text:c="18"/></text:p>
      <text:p text:style-name="P22"><text:span text:style-name="T14">This diagram shows the working flow of an </text:span><text:span text:style-name="Strong_20_Emphasis"><text:span text:style-name="T15">Arithmetic Expression Evaluator</text:span></text:span><text:span text:style-name="T14"> (like a simple compiler process).</text:span></text:p>
      <text:p text:style-name="P20"><text:span text:style-name="T14">It starts when the user gives an </text:span><text:span text:style-name="Strong_20_Emphasis"><text:span text:style-name="T15">arithmetic expression</text:span></text:span><text:span text:style-name="T14">. First, the </text:span><text:span text:style-name="Strong_20_Emphasis"><text:span text:style-name="T15">lexical analyzer</text:span></text:span><text:span text:style-name="T14"> breaks the expression into small meaningful units called </text:span><text:span text:style-name="Emphasis"><text:span text:style-name="T15">tokens</text:span></text:span><text:span text:style-name="T14"> (like numbers, operators, etc.). Then the </text:span><text:span text:style-name="Strong_20_Emphasis"><text:span text:style-name="T15">syntax analyzer</text:span></text:span><text:span text:style-name="T14"> checks whether the expression follows correct grammar rules. If there is an error, it shows a </text:span><text:span text:style-name="Strong_20_Emphasis"><text:span text:style-name="T15">syntax error</text:span></text:span><text:span text:style-name="T14"> message.</text:span></text:p>
      <text:p text:style-name="P20"><text:span text:style-name="T14">If the expression is valid, the system generates a </text:span><text:span text:style-name="Strong_20_Emphasis"><text:span text:style-name="T15">parse tree</text:span></text:span><text:span text:style-name="T14">, which represents the structure of the expression. After that, </text:span><text:span text:style-name="Strong_20_Emphasis"><text:span text:style-name="T15">semantic analysis</text:span></text:span><text:span text:style-name="T14"> is performed to make sure the expression makes logical sense. Then the system evaluates it and </text:span><text:span text:style-name="Strong_20_Emphasis"><text:span text:style-name="T15">generates the final result</text:span></text:span><text:span text:style-name="T14">, which is finally shown to the user as </text:span><text:span text:style-name="Strong_20_Emphasis"><text:span text:style-name="T15">output</text:span></text:span><text:span text:style-name="T14">.</text:span></text:p>
      <text:p text:style-name="P23">At the end, the process stops</text:p>
      <text:p text:style-name="P24"/>
      <text:p text:style-name="Standard" loext:marker-style-name="T13"><text:span text:style-name="T13"><text:s text:c="18"/></text:span><text:span text:style-name="T13"/></text:p>
      <text:p text:style-name="Standard" loext:marker-style-name="T13"><text:span text:style-name="T13"><text:s text:c="24"/></text:span><text:span text:style-name="T13"/></text:p>
      <text:p text:style-name="Standard" loext:marker-style-name="T8"><text:span text:style-name="T13"><text:s text:c="29"/></text:span></text:p>
      <text:p text:style-name="P25" loext:marker-style-name="T8"/>
      <text:p text:style-name="P25" loext:marker-style-name="T7"/>
      <text:p text:style-name="P25" loext:marker-style-name="T8"/>
      <text:p text:style-name="P26"/>
      <text:p text:style-name="P26" loext:marker-style-name="T16"/>
      <text:p text:style-name="P26" loext:marker-style-name="T16"/>
      <text:p text:style-name="P26" loext:marker-style-name="T16"/>
      <text:p text:style-name="P26" loext:marker-style-name="T16"/>
      <text:p text:style-name="P26" loext:marker-style-name="T16"/>
      <text:p text:style-name="P26" loext:marker-style-name="T16"/>
      <text:p text:style-name="P26" loext:marker-style-name="T16"><text:soft-page-break/></text:p>
      <text:p text:style-name="P26" loext:marker-style-name="T16"/>
      <text:p text:style-name="P26" loext:marker-style-name="T16">FLOWCHART:</text:p>
      <text:p text:style-name="P25" loext:marker-style-name="T8"><draw:g text:anchor-type="char" draw:z-index="0" draw:name="Group 36" draw:style-name="gr1"><draw:custom-shape draw:name="Shape 56" draw:style-name="gr2" draw:text-style-name="P27" svg:width="2.8748in" svg:height="1.0335in" svg:x="2.0047in" svg:y="0.0701in"><text:p/><draw:enhanced-geometry draw:mirror-horizontal="false" draw:mirror-vertical="false" drawooo:sub-view-size="3048000 1016000" draw:text-areas="0 0 0 0" svg:viewBox="0 0 3048000 1016000" draw:type="ooxml-non-primitive" draw:enhanced-path="M 1524000 0 C 2365682 0 3048000 227439 3048000 508000 3048000 788561 2365682 1016000 1524000 1016000 682318 1016000 0 788561 0 508000 0 227439 682318 0 1524000 0 Z N"/></draw:custom-shape><draw:custom-shape draw:name="Rectangle 38" draw:style-name="gr3" draw:text-style-name="P29" svg:width="0.5043in" svg:height="0.1543in" svg:x="3.3047in" svg:y="0.7835in"><text:p text:style-name="P28"><text:span text:style-name="T17">START</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4" draw:text-style-name="P30" svg:width="2.515in" svg:height="0.5161in" svg:x="1.9276in" svg:y="1.3626in"><text:p/><draw:enhanced-geometry draw:mirror-horizontal="false" draw:mirror-vertical="false" drawooo:sub-view-size="2667000 508000" draw:text-areas="0 0 0 0" svg:viewBox="0 0 2667000 508000" draw:type="ooxml-non-primitive" draw:enhanced-path="M 0 0 L 2286000 0 2667000 508000 381000 508000 0 0 Z N"/></draw:custom-shape><draw:custom-shape draw:name="Rectangle 40" draw:style-name="gr5" draw:text-style-name="P29" svg:width="1.0752in" svg:height="0.1543in" svg:x="2.8256in" svg:y="1.5583in"><text:p text:style-name="P28"><text:span text:style-name="T17">Read Express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6" draw:style-name="gr6" draw:text-style-name="P30" svg:width="1.6768in" svg:height="0.5807in" svg:x="2.5264in" svg:y="2.2028in"><text:p/><draw:enhanced-geometry draw:mirror-horizontal="false" draw:mirror-vertical="false" drawooo:sub-view-size="1778000 571500" draw:text-areas="0 0 0 0" svg:viewBox="0 0 1778000 571499" draw:type="ooxml-non-primitive" draw:enhanced-path="M 0 0 L 1778000 0 1778000 571500 0 571500 0 0 N"/></draw:custom-shape><draw:custom-shape draw:name="Rectangle 42" draw:style-name="gr7" draw:text-style-name="P29" svg:width="0.8406in" svg:height="0.1543in" svg:x="2.8256in" svg:y="2.4374in"><text:p text:style-name="P28"><text:span text:style-name="T17">Tokenizat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8" draw:text-style-name="P30" svg:width="1.9161in" svg:height="0.7386in" svg:x="2.3276in" svg:y="2.8008in"><text:p/><draw:enhanced-geometry draw:mirror-horizontal="false" draw:mirror-vertical="false" drawooo:sub-view-size="2032000 1016000" draw:text-areas="0 0 0 0" svg:viewBox="0 0 2032000 725976" draw:type="ooxml-non-primitive" draw:enhanced-path="M 1016000 0 L 2032000 508000 1016000 1016000 0 508000 1016000 0 Z N"/></draw:custom-shape><draw:custom-shape draw:name="Rectangle 44" draw:style-name="gr9" draw:text-style-name="P29" svg:width="0.7835in" svg:height="0.1543in" svg:x="2.9457in" svg:y="3.1091in"><text:p text:style-name="P28"><text:span text:style-name="T17">Syntax OK?</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7" draw:style-name="gr10" draw:text-style-name="P30" svg:width="1.4362in" svg:height="0.5161in" svg:x="4.563in" svg:y="2.913in"><text:p/><draw:enhanced-geometry draw:mirror-horizontal="false" draw:mirror-vertical="false" drawooo:sub-view-size="1524000 508000" draw:text-areas="0 0 0 0" svg:viewBox="0 0 1524000 508000" draw:type="ooxml-non-primitive" draw:enhanced-path="M 0 0 L 1524000 0 1524000 508000 0 508000 0 0 N"/></draw:custom-shape><draw:custom-shape draw:name="Rectangle 46" draw:style-name="gr11" draw:text-style-name="P29" svg:width="0.5571in" svg:height="0.1543in" svg:x="4.922in" svg:y="3.1091in"><text:p text:style-name="P28"><text:span text:style-name="T17">Evaluat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12" draw:text-style-name="P27" svg:width="2.6343in" svg:height="1.0335in" svg:x="3.7492in" svg:y="3.9547in"><text:p/><draw:enhanced-geometry draw:mirror-horizontal="false" draw:mirror-vertical="false" drawooo:sub-view-size="2794000 1016000" draw:text-areas="0 0 0 0" svg:viewBox="0 0 2794000 1016000" draw:type="ooxml-non-primitive" draw:enhanced-path="M 1397000 0 C 2168542 0 2794000 227439 2794000 508000 2794000 788561 2168542 1016000 1397000 1016000 625458 1016000 0 788561 0 508000 0 227439 625458 0 1397000 0 Z N"/></draw:custom-shape><draw:custom-shape draw:name="Rectangle 48" draw:style-name="gr13" draw:text-style-name="P29" svg:width="0.3268in" svg:height="0.1543in" svg:x="5.1618in" svg:y="4.272in"><text:p text:style-name="P28"><text:span text:style-name="T17">END</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8" draw:style-name="gr10" draw:text-style-name="P30" svg:width="1.4362in" svg:height="0.5161in" svg:x="0.5484in" svg:y="2.889in"><text:p/><draw:enhanced-geometry draw:mirror-horizontal="false" draw:mirror-vertical="false" drawooo:sub-view-size="1524000 508000" draw:text-areas="0 0 0 0" svg:viewBox="0 0 1524000 508000" draw:type="ooxml-non-primitive" draw:enhanced-path="M 0 0 L 1524000 0 1524000 508000 0 508000 0 0 N"/></draw:custom-shape><draw:custom-shape draw:name="Rectangle 50" draw:style-name="gr14" draw:text-style-name="P29" svg:width="0.8713in" svg:height="0.1543in" svg:x="0.8264in" svg:y="3.1091in"><text:p text:style-name="P31">Di</text:p><text:p text:style-name="P31"/><text:p text:style-name="P31">ror</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 draw:style-name="gr15" draw:text-style-name="P27" svg:width="2.4906in" svg:height="1.0335in" svg:x="0.2673in" svg:y="3.7957in"><text:p/><draw:enhanced-geometry draw:mirror-horizontal="false" draw:mirror-vertical="false" drawooo:sub-view-size="2641600 1016000" draw:text-areas="0 0 0 0" svg:viewBox="0 0 2641600 1016000" draw:type="ooxml-non-primitive" draw:enhanced-path="M 1244600 0 C 2016142 0 2641600 227439 2641600 508000 2641600 788561 2016142 1016000 1244600 1016000 714165 1016000 252777 908500 16210 750143 L 0 737907 0 278094 16210 265857 C 252777 107500 714165 0 1244600 0 Z N"/></draw:custom-shape><draw:custom-shape draw:name="Rectangle 52" draw:style-name="gr13" draw:text-style-name="P29" svg:width="0.3268in" svg:height="0.1543in" svg:x="1.2091in" svg:y="4.272in"><text:p text:style-name="P28"><text:span text:style-name="T17">END</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 draw:style-name="gr16" draw:text-style-name="P32" svg:width="0.0012in" svg:height="0.2579in" svg:x="3.4854in" svg:y="1.1039in"><text:p/><draw:enhanced-geometry draw:mirror-horizontal="false" draw:mirror-vertical="false" drawooo:sub-view-size="0 254000" draw:text-areas="0 0 0 0" svg:viewBox="0 0 0 254000" draw:type="ooxml-non-primitive" draw:enhanced-path="M 0 0 L 0 254000 N"/></draw:custom-shape><draw:custom-shape draw:name="Shape 73" draw:style-name="gr17" draw:text-style-name="P32" svg:width="0.0012in" svg:height="0.3224in" svg:x="3.4854in" svg:y="1.8791in"><text:p/><draw:enhanced-geometry draw:mirror-horizontal="false" draw:mirror-vertical="false" drawooo:sub-view-size="0 317500" draw:text-areas="0 0 0 0" svg:viewBox="0 0 0 317500" draw:type="ooxml-non-primitive" draw:enhanced-path="M 0 0 L 0 317500 N"/></draw:custom-shape><draw:custom-shape draw:name="Shape 75" draw:style-name="gr18" draw:text-style-name="P32" svg:width="0.3587in" svg:height="0.0012in" svg:x="4.2039in" svg:y="3.1717in"><text:p/><draw:enhanced-geometry draw:mirror-horizontal="false" draw:mirror-vertical="false" drawooo:sub-view-size="381000 0" draw:text-areas="0 0 0 0" svg:viewBox="0 0 381000 0" draw:type="ooxml-non-primitive" draw:enhanced-path="M 0 0 L 381000 0 N"/></draw:custom-shape><draw:custom-shape draw:name="Rectangle 57" draw:style-name="gr19" draw:text-style-name="P29" svg:width="0.1976in" svg:height="0.1232in" svg:x="4.3236in" svg:y="2.9717in"><text:p text:style-name="P28"><text:span text:style-name="T18">Ye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 draw:style-name="gr20" draw:text-style-name="P32" svg:width="0.2394in" svg:height="0.0012in" svg:x="2.048in" svg:y="3.1717in"><text:p/><draw:enhanced-geometry draw:mirror-horizontal="false" draw:mirror-vertical="false" drawooo:sub-view-size="254000 0" draw:text-areas="0 0 0 0" svg:viewBox="0 0 254000 0" draw:type="ooxml-non-primitive" draw:enhanced-path="M 254000 0 L 0 0 N"/></draw:custom-shape><draw:custom-shape draw:name="Rectangle 60" draw:style-name="gr21" draw:text-style-name="P29" svg:width="0.1551in" svg:height="0.1232in" svg:x="2.1075in" svg:y="2.9717in"><text:p text:style-name="P28"><text:span text:style-name="T18">N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22" draw:text-style-name="P32" svg:width="0.1067in" svg:height="0.5469in" svg:x="5.1736in" svg:y="3.4299in"><text:p/><draw:enhanced-geometry draw:mirror-horizontal="true" draw:mirror-vertical="false" drawooo:sub-view-size="0 635000" draw:text-areas="0 0 0 0" svg:viewBox="0 0 113234 537635" draw:type="ooxml-non-primitive" draw:enhanced-path="M 0 0 L 0 635000 N"/></draw:custom-shape><draw:custom-shape draw:name="Shape 80" draw:style-name="gr23" draw:text-style-name="P32" svg:width="0.0732in" svg:height="0.3925in" svg:x="1.2543in" svg:y="3.4299in"><text:p/><draw:enhanced-geometry draw:mirror-horizontal="true" draw:mirror-vertical="false" drawooo:sub-view-size="0 635000" draw:text-areas="0 0 0 0" svg:viewBox="0 0 77791 386376" draw:type="ooxml-non-primitive" draw:enhanced-path="M 0 0 L 0 635000 N"/></draw:custom-shape></draw:g></text:p>
      <text:p text:style-name="P25" loext:marker-style-name="T8"/>
      <text:p text:style-name="P33" loext:marker-style-name="T8"><text:span text:style-name="Strong_20_Emphasis"/></text:p>
      <text:p text:style-name="P33" loext:marker-style-name="T8"><text:span text:style-name="Strong_20_Emphasis"/></text:p>
      <text:p text:style-name="P33"><text:span text:style-name="Strong_20_Emphasis"><text:span text:style-name="T14">1) Input Expression:</text:span></text:span><text:span text:style-name="T14"> The user enters an arithmetic expression.<text:line-break/></text:span><text:span text:style-name="Strong_20_Emphasis"><text:span text:style-name="T14">2) Tokenization/Parsing:</text:span></text:span><text:span text:style-name="T14"> The expression is broken into operands and operators.<text:line-break/></text:span><text:span text:style-name="Strong_20_Emphasis"><text:span text:style-name="T14">3) Evaluation Process:</text:span></text:span><text:span text:style-name="T14"> The expression is evaluated based on operator precedence (+, -, *, /).<text:line-break/></text:span><text:soft-page-break/><text:span text:style-name="Strong_20_Emphasis"><text:span text:style-name="T14">4) Output Result:</text:span></text:span><text:span text:style-name="T14"> The final calculated result is displayed to the user.</text:span></text:p>
      <text:p text:style-name="P25" loext:marker-style-name="T8"/>
      <text:p text:style-name="P25" loext:marker-style-name="T8"/>
      <text:p text:style-name="P25" loext:marker-style-name="T8"/>
      <text:p text:style-name="P34"/>
      <text:h text:style-name="P6" text:outline-level="1" loext:marker-style-name="T19"><text:span text:style-name="T19">System Documentation</text:span><text:span text:style-name="T19"/></text:h>
      <text:p text:style-name="P35" loext:marker-style-name="T20"><text:span text:style-name="T21">Input:</text:span><text:span text:style-name="T21"/></text:p>
      <text:p text:style-name="P36" loext:marker-style-name="T20"><text:span text:style-name="T20">The user enters an arithmetic expression such as (5 + 3) * 2.</text:span><text:span text:style-name="T20"/></text:p>
      <text:p text:style-name="P35" loext:marker-style-name="T20"><text:span text:style-name="T21">Lexical Analysis:</text:span><text:span text:style-name="T21"/></text:p>
      <text:p text:style-name="P36" loext:marker-style-name="T20"><text:span text:style-name="T20">The expression is divided into tokens including numbers, operators, and parentheses.</text:span><text:span text:style-name="T20"/></text:p>
      <text:p text:style-name="P35" loext:marker-style-name="T20"><text:span text:style-name="T21">Syntax Analysis:</text:span><text:span text:style-name="T21"/></text:p>
      <text:p text:style-name="P36" loext:marker-style-name="T20"><text:span text:style-name="T20">The parser verifies that the expression follows valid grammar rules and contains no syntax errors.</text:span><text:span text:style-name="T20"/></text:p>
      <text:p text:style-name="P35" loext:marker-style-name="T20"><text:span text:style-name="T21">Expression Evaluation:</text:span><text:span text:style-name="T21"/></text:p>
      <text:p text:style-name="P36" loext:marker-style-name="T20"><text:span text:style-name="T20">The evaluator processes the expression according to operator precedence and associativity rules.</text:span><text:span text:style-name="T20"/></text:p>
      <text:p text:style-name="P35" loext:marker-style-name="T20"><text:span text:style-name="T21">Output:</text:span><text:span text:style-name="T21"/></text:p>
      <text:p text:style-name="P37" loext:marker-style-name="T20"><text:span text:style-name="T20">The final computed result is displayed to the user.</text:span><text:span text:style-name="T20"/></text:p>
      <text:h text:style-name="P6" text:outline-level="1" loext:marker-style-name="T19"><text:span text:style-name="T19">Example</text:span><text:span text:style-name="T19"/></text:h>
      <text:p text:style-name="P38" loext:marker-style-name="T20"><text:span text:style-name="T20">Expression: (5 + 3) × 2</text:span><text:span text:style-name="T20"/></text:p>
      <text:p text:style-name="P38" loext:marker-style-name="T20"><text:span text:style-name="T20">Step 1:</text:span><text:span text:style-name="T20"/></text:p>
      <text:p text:style-name="P38" loext:marker-style-name="T20"><text:span text:style-name="T20"><text:s/>5 + 3 = 8</text:span><text:span text:style-name="T20"/></text:p>
      <text:p text:style-name="P39" loext:marker-style-name="T20"><text:span text:style-name="T20">Step 2: <text:s text:c="2"/>8 × 2 = 16 Final </text:span><text:soft-page-break/><text:span text:style-name="T20">Result = 16</text:span><text:span text:style-name="T20"/></text:p>
      <text:h text:style-name="P6" text:outline-level="1" loext:marker-style-name="T19"><text:span text:style-name="T19">Conclusion</text:span><text:span text:style-name="T19"/></text:h>
      <text:p text:style-name="No_20_Spacing" loext:marker-style-name="T22">The Arithmetic Expression Evaluator successfully demonstrates the fundamental principles of compiler construction in a simple and practical way. It takes arithmetic expressions as input and systematically processes them through lexical analysis and syntax analysis to ensure correctness. By applying operator precedence and associativity rules, the system accurately evaluates expressions and produces reliable results. This project not only helps in understanding how compilers interpret and process mathematical expressions, but also highlights the importance of structured parsing techniques used in real-world programming languages. Overall, it provides a clear and effective implementation of how expression evaluation works inside a compiler-like system.<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right="0.9709in" fo:margin-top="0in" fo:margin-bottom="0.0043in" style:contextual-spacing="false" fo:line-height="106%" fo:text-align="left" style:justify-single-word="false" fo:orphans="2" fo:widows="2" fo:text-indent="-0.0071in" style:auto-text-indent="false" style:writing-mode="lr-tb"/>
      <style:text-properties fo:color="#000000" loext:opacity="100%" style:font-name="Arial" fo:font-family="Arial" style:font-family-generic="swiss"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0071in" fo:margin-right="1.0835in" fo:margin-top="0in" fo:margin-bottom="0.002in" style:contextual-spacing="false" fo:line-height="110%" fo:text-align="left" style:justify-single-word="false" fo:keep-together="always" fo:orphans="2" fo:widows="2" fo:text-indent="-0.0071in" style:auto-text-indent="false" fo:keep-with-next="always" style:writing-mode="lr-tb"/>
      <style:text-properties fo:color="#000000" loext:opacity="100%" style:font-name="Arial" fo:font-family="Arial" style:font-family-generic="swiss"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28in" fo:margin-bottom="0in" style:contextual-spacing="false" fo:keep-together="always" fo:keep-with-next="always"/>
      <style:text-properties fo:color="#2e74b5" loext:opacity="100%" style:font-name="Calibri Light1" fo:font-family="'Calibri Light'" style:font-family-generic="swiss"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1" fo:font-family="'Calibri Light'"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28in" fo:margin-bottom="0in" style:contextual-spacing="false" fo:keep-together="always" fo:keep-with-next="always"/>
      <style:text-properties fo:color="#2e74b5" loext:opacity="100%" style:font-name="Calibri Light1" fo:font-family="'Calibri Light'" style:font-family-generic="swiss"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Normal_20__28_Web_29_" style:display-name="Normal (Web)" style:family="paragraph" style:parent-style-name="Standard">
      <style:paragraph-properties fo:margin-left="0in" fo:margin-righ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left="0.0071in" fo:margin-right="0.9709in" fo:margin-top="0in" fo:margin-bottom="0in" style:contextual-spacing="false" fo:line-height="100%" fo:text-align="left" style:justify-single-word="false" fo:orphans="2" fo:widows="2" fo:text-indent="-0.0071in" style:auto-text-indent="false" style:writing-mode="lr-tb"/>
      <style:text-properties fo:color="#000000" loext:opacity="100%" style:font-name="Arial" fo:font-family="Arial" style:font-family-generic="swiss"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Arial" fo:font-family="Arial" style:font-family-generic="swiss"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HP LAPTOP</meta:initial-creator>
    <meta:editing-cycles>4</meta:editing-cycles>
    <meta:creation-date>2026-06-10T05:40:00</meta:creation-date>
    <dc:date>2026-06-22T23:36:28.829804208</dc:date>
    <meta:editing-duration>PT37M6S</meta:editing-duration>
    <meta:generator>LibreOffice/26.2.3.2$Linux_X86_64 LibreOffice_project/d4d5ed47b6084125f28d269a5650105d54dde034</meta:generator>
    <meta:document-statistic meta:table-count="0" meta:image-count="2" meta:object-count="0" meta:page-count="8" meta:paragraph-count="64" meta:word-count="570" meta:character-count="3977" meta:non-whitespace-character-count="3315"/>
    <meta:user-defined meta:name="AppVersion">16.0000</meta:user-defined>
    <meta:template xlink:type="simple" xlink:actuate="onRequest" xlink:title="Normal" xlink:href=""/>
  </office:meta>
</office:document-meta>
</file>